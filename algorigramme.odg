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3cm" fo:min-width="7.25cm"/>
      <style:paragraph-properties style:writing-mode="lr-tb"/>
    </style:style>
    <style:style style:name="gr2" style:family="graphic" style:parent-style-name="standard">
      <style:graphic-properties draw:fill-color="#a1467e" draw:textarea-horizontal-align="justify" draw:textarea-vertical-align="middle" draw:auto-grow-height="false" fo:min-height="3.25cm" fo:min-width="6.75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cm" fo:min-width="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cm" fo:min-width="8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42cm" fo:min-width="4.98cm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2.25cm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4.75cm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2cm" fo:min-width="5cm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2.25cm" fo:min-width="5.5cm"/>
      <style:paragraph-properties style:writing-mode="lr-tb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2.048cm" fo:min-width="4.45cm"/>
      <style:paragraph-properties style:writing-mode="lr-tb"/>
    </style:style>
    <style:style style:name="gr12" style:family="graphic" style:parent-style-name="standard">
      <style:graphic-properties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2.226cm" fo:min-width="5.158cm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1.783cm" fo:min-width="4.25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1.168cm" fo:min-width="3.75cm"/>
      <style:paragraph-properties style:writing-mode="lr-tb"/>
    </style:style>
    <style:style style:name="gr16" style:family="graphic" style:parent-style-name="standard">
      <style:graphic-properties draw:fill-color="#a1467e" draw:textarea-horizontal-align="justify" draw:textarea-vertical-align="middle" draw:auto-grow-height="false" fo:min-height="1.696cm" fo:min-width="3.92cm"/>
      <style:paragraph-properties style:writing-mode="lr-tb"/>
    </style:style>
    <style:style style:name="gr17" style:family="graphic" style:parent-style-name="standard">
      <style:graphic-properties draw:fill-color="#2bd3d6" draw:textarea-horizontal-align="justify" draw:textarea-vertical-align="middle" draw:auto-grow-height="false" fo:min-height="1.696cm" fo:min-width="3.92cm"/>
      <style:paragraph-properties style:writing-mode="lr-tb"/>
    </style:style>
    <style:style style:name="gr18" style:family="graphic" style:parent-style-name="standard">
      <style:graphic-properties draw:fill-color="#a1467e" draw:textarea-horizontal-align="justify" draw:textarea-vertical-align="middle" draw:auto-grow-height="false" fo:min-height="1.342cm" fo:min-width="4.98cm"/>
      <style:paragraph-properties style:writing-mode="lr-tb"/>
    </style:style>
    <style:style style:name="gr19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852cm" fo:min-width="3.594cm"/>
      <style:paragraph-properties style:writing-mode="lr-tb"/>
    </style:style>
    <style:style style:name="gr20" style:family="graphic" style:parent-style-name="standard">
      <style:graphic-properties draw:fill="none" loext:fill-use-slide-background="false" draw:textarea-horizontal-align="justify" draw:textarea-vertical-align="middle" draw:auto-grow-height="false" fo:min-height="0.852cm" fo:min-width="3.278cm"/>
      <style:paragraph-properties style:writing-mode="lr-tb"/>
    </style:style>
    <style:style style:name="gr21" style:family="graphic" style:parent-style-name="standard">
      <style:graphic-properties draw:fill="none" loext:fill-use-slide-background="false" draw:textarea-horizontal-align="justify" draw:textarea-vertical-align="middle" draw:auto-grow-height="false" fo:min-height="0.852cm" fo:min-width="2.964cm"/>
      <style:paragraph-properties style:writing-mode="lr-tb"/>
    </style:style>
    <style:style style:name="gr22" style:family="graphic" style:parent-style-name="standard">
      <style:graphic-properties draw:fill="none" loext:fill-use-slide-background="false" draw:textarea-horizontal-align="justify" draw:textarea-vertical-align="middle" draw:auto-grow-height="false" fo:min-height="1.5cm" fo:min-width="2.376cm"/>
      <style:paragraph-properties style:writing-mode="lr-tb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1.872cm" fo:min-width="3.566cm"/>
      <style:paragraph-properties style:writing-mode="lr-tb"/>
    </style:style>
    <style:style style:name="gr24" style:family="graphic" style:parent-style-name="standard">
      <style:graphic-properties draw:fill="none" loext:fill-use-slide-background="false" draw:textarea-horizontal-align="justify" draw:textarea-vertical-align="middle" draw:auto-grow-height="false" fo:min-height="1.342cm" fo:min-width="3.354cm"/>
      <style:paragraph-properties style:writing-mode="lr-tb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fill-color="#a1467e" draw:textarea-horizontal-align="justify" draw:textarea-vertical-align="middle" draw:auto-grow-height="false" fo:min-height="1.342cm" fo:min-width="3.214cm"/>
      <style:paragraph-properties style:writing-mode="lr-tb"/>
    </style:style>
    <style:style style:name="gr27" style:family="graphic" style:parent-style-name="standard">
      <style:graphic-properties draw:fill="none" loext:fill-use-slide-background="false" fo:min-height="1.25cm" fo:min-width="2.25cm"/>
      <style:paragraph-properties style:writing-mode="lr-tb"/>
    </style:style>
    <style:style style:name="gr28" style:family="graphic" style:parent-style-name="standard">
      <style:graphic-properties draw:fill="none" loext:fill-use-slide-background="false" draw:textarea-horizontal-align="justify" draw:textarea-vertical-align="middle" draw:auto-grow-height="false" fo:min-height="1.25cm" fo:min-width="2.25cm"/>
      <style:paragraph-properties style:writing-mode="lr-tb"/>
    </style:style>
    <style:style style:name="gr29" style:family="graphic" style:parent-style-name="standard">
      <style:graphic-properties draw:fill="none" loext:fill-use-slide-background="false" draw:textarea-horizontal-align="justify" draw:textarea-vertical-align="middle" draw:auto-grow-height="false" fo:min-height="1.376cm" fo:min-width="2.5cm"/>
      <style:paragraph-properties style:writing-mode="lr-tb"/>
    </style:style>
    <style:style style:name="gr30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3.436cm"/>
      <style:paragraph-properties style:writing-mode="lr-tb"/>
    </style:style>
    <style:style style:name="gr31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3.121cm"/>
      <style:paragraph-properties style:writing-mode="lr-tb"/>
    </style:style>
    <style:style style:name="gr32" style:family="graphic" style:parent-style-name="standard">
      <style:graphic-properties draw:fill="none" loext:fill-use-slide-background="false" draw:textarea-horizontal-align="justify" draw:textarea-vertical-align="middle" draw:auto-grow-height="false" fo:min-height="1.696cm" fo:min-width="4.45cm"/>
      <style:paragraph-properties style:writing-mode="lr-tb"/>
    </style:style>
    <style:style style:name="gr33" style:family="graphic" style:parent-style-name="standard">
      <style:graphic-properties draw:fill="none" loext:fill-use-slide-background="false" fo:min-height="1.25cm" fo:min-width="3cm"/>
      <style:paragraph-properties style:writing-mode="lr-tb"/>
    </style:style>
    <style:style style:name="gr34" style:family="graphic" style:parent-style-name="standard">
      <style:graphic-properties draw:fill="none" loext:fill-use-slide-background="false" draw:textarea-horizontal-align="justify" draw:textarea-vertical-align="middle" draw:auto-grow-height="false" fo:min-height="1.01cm" fo:min-width="6.898cm"/>
      <style:paragraph-properties style:writing-mode="lr-tb"/>
    </style:style>
    <style:style style:name="gr35" style:family="graphic" style:parent-style-name="standard">
      <style:graphic-properties draw:fill="none" loext:fill-use-slide-background="false" draw:textarea-horizontal-align="justify" draw:textarea-vertical-align="middle" draw:auto-grow-height="false" fo:min-height="1.376cm" fo:min-width="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loext:graphic-properties draw:fill-color="#a1467e"/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00"/>
      <style:paragraph-properties fo:text-align="center" style:writing-mode="lr-tb"/>
    </style:style>
    <style:style style:name="P8" style:family="paragraph">
      <loext:graphic-properties draw:fill-color="#2bd3d6"/>
      <style:paragraph-properties fo:text-align="center" style:writing-mode="lr-tb"/>
    </style:style>
    <style:style style:name="P9" style:family="paragraph">
      <loext:graphic-properties draw:fill="none" draw:fill-color="#729fcf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-color="#a1467e"/>
      <style:paragraph-properties fo:text-align="center"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75cm" svg:height="3.25cm" svg:x="3.25cm" svg:y="3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3.5cm" svg:x="2.75cm" svg:y="8cm">
          <text:p text:style-name="P1">Playercontro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5cm" svg:height="3.25cm" svg:x="13.25cm" svg:y="3.25cm">
          <text:p text:style-name="P1">Infofr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3.75cm" svg:x="13.25cm" svg:y="8.25cm">
          <text:p text:style-name="P1">ApplicationMenu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5" draw:text-style-name="P1" xml:id="id2" draw:id="id2" draw:layer="layout" svg:width="7.75cm" svg:height="2.25cm" svg:x="10.5cm" svg:y="1.5cm">
          <text:p text:style-name="P1">Application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" draw:id="id1" draw:layer="layout" svg:width="2.75cm" svg:height="2cm" svg:x="2.25cm" svg:y="4.75cm">
          <text:p text:style-name="P1">New code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5.25cm" svg:height="2cm" svg:x="6.25cm" svg:y="4.75cm">
          <text:p text:style-name="P1">New session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5.5cm" svg:height="2.25cm" svg:x="13.5cm" svg:y="4.75cm">
          <text:p text:style-name="P1">Retrieve a sesion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6cm" svg:height="2.5cm" svg:x="20.75cm" svg:y="4.75cm">
          <text:p text:style-name="P1">Free viewing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75cm" svg:y1="6.75cm" svg:x2="8.75cm" svg:y2="8.5cm">
          <text:p/>
        </draw:line>
        <draw:custom-shape draw:style-name="gr11" draw:text-style-name="P7" draw:layer="layout" svg:width="7cm" svg:height="3.25cm" svg:x="5.25cm" svg:y="8.5cm">
          <text:p text:style-name="P1">Info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svg:x1="3.625cm" svg:y1="4.75cm" svg:x2="14.375cm" svg:y2="3.75cm" draw:start-shape="id1" draw:start-glue-point="0" draw:end-shape="id2" draw:end-glue-point="8" svg:d="M3625 4750v-501h4125v3h6625v-502" svg:viewBox="0 0 10751 1001">
          <text:p/>
        </draw:connector>
        <draw:connector draw:style-name="gr12" draw:layer="layout" svg:x1="14.375cm" svg:y1="3.75cm" svg:x2="16.25cm" svg:y2="4.75cm" draw:start-shape="id2" draw:start-glue-point="8" draw:end-shape="id3" draw:end-glue-point="0" svg:d="M14375 3750v501h1875v499" svg:viewBox="0 0 1876 1001">
          <text:p/>
        </draw:connector>
        <draw:connector draw:style-name="gr12" draw:layer="layout" svg:x1="14.375cm" svg:y1="3.75cm" svg:x2="23.75cm" svg:y2="4.75cm" draw:start-shape="id2" draw:start-glue-point="8" draw:end-shape="id4" draw:end-glue-point="0" svg:d="M14375 3750v502h5126v-3h4249v501" svg:viewBox="0 0 9376 1001">
          <text:p/>
        </draw:connector>
        <draw:connector draw:style-name="gr12" draw:layer="layout" draw:line-skew="0cm 6.251cm -3.001cm" svg:x1="8.875cm" svg:y1="4.75cm" svg:x2="14.375cm" svg:y2="3.75cm" draw:start-shape="id5" draw:start-glue-point="0" draw:end-shape="id2" draw:end-glue-point="8" svg:d="M8875 4750v-501h3125v1h2375v-500" svg:viewBox="0 0 5501 1001">
          <text:p/>
        </draw:connector>
      </draw:page>
      <draw:page draw:name="page3" draw:style-name="dp1" draw:master-page-name="Standard">
        <draw:custom-shape draw:style-name="gr13" draw:text-style-name="P4" draw:layer="layout" svg:width="8cm" svg:height="3.5cm" svg:x="10.25cm" svg:y="0.75cm">
          <text:p text:style-name="P1">Info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.75cm" svg:height="2.033cm" svg:x="11.925cm" svg:y="5.217cm">
          <text:p text:style-name="P1">Load media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4.25cm" svg:y1="4.25cm" svg:x2="14.25cm" svg:y2="5.25cm">
          <text:p/>
        </draw:line>
        <draw:line draw:style-name="gr10" draw:text-style-name="P6" draw:layer="layout" svg:x1="14.25cm" svg:y1="8.75cm" svg:x2="14.25cm" svg:y2="7.25cm">
          <text:p/>
        </draw:line>
        <draw:custom-shape draw:style-name="gr15" draw:text-style-name="P2" draw:layer="layout" svg:width="6.75cm" svg:height="2.25cm" svg:x="10.5cm" svg:y="8.75cm">
          <text:p text:style-name="P1">ask_media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.25cm" svg:y1="11cm" svg:x2="14.25cm" svg:y2="12cm">
          <text:p/>
        </draw:line>
        <draw:custom-shape draw:style-name="gr14" draw:text-style-name="P5" draw:layer="layout" svg:width="4.75cm" svg:height="2.033cm" svg:x="12cm" svg:y="12cm">
          <text:p text:style-name="P1">Load cod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75cm" svg:height="2.25cm" svg:x="10.5cm" svg:y="15.5cm">
          <text:p text:style-name="P1">ask_cod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.25cm" svg:y1="15.5cm" svg:x2="14.25cm" svg:y2="14cm">
          <text:p/>
        </draw:line>
        <draw:line draw:style-name="gr10" draw:text-style-name="P6" draw:layer="layout" svg:x1="16.25cm" svg:y1="10cm" svg:x2="20cm" svg:y2="10cm">
          <text:p/>
        </draw:line>
        <draw:custom-shape draw:style-name="gr16" draw:text-style-name="P3" draw:layer="layout" svg:width="6.25cm" svg:height="2.75cm" svg:x="19.75cm" svg:y="8.5cm">
          <text:p text:style-name="P1">PlayerControl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6.25cm" svg:height="2.75cm" svg:x="19.75cm" svg:y="15.25cm">
          <text:p text:style-name="P1">CodingFramework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6.25cm" svg:y1="16.75cm" svg:x2="19.75cm" svg:y2="16.75cm">
          <text:p/>
        </draw:line>
      </draw:page>
      <draw:page draw:name="page4" draw:style-name="dp1" draw:master-page-name="Standard">
        <draw:custom-shape draw:style-name="gr18" draw:text-style-name="P3" xml:id="id9" draw:id="id9" draw:layer="layout" svg:width="7.75cm" svg:height="2.25cm" svg:x="10.5cm" svg:y="1.501cm">
          <text:p text:style-name="P1">Player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2.75cm" svg:height="2cm" svg:x="2.25cm" svg:y="4.751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7" draw:text-style-name="P5" xml:id="id10" draw:id="id10" draw:layer="layout" svg:width="5.25cm" svg:height="2cm" svg:x="6.25cm" svg:y="4.751cm">
          <text:p text:style-name="P1">Play/pause</text:p>
          <draw:enhanced-geometry svg:viewBox="0 0 21600 21600" draw:type="rectangle" draw:enhanced-path="M 0 0 L 21600 0 21600 21600 0 21600 0 0 Z N"/>
        </draw:custom-shape>
        <draw:custom-shape draw:style-name="gr8" draw:text-style-name="P5" xml:id="id11" draw:id="id11" draw:layer="layout" svg:width="5.5cm" svg:height="2.25cm" svg:x="13.5cm" svg:y="4.751cm">
          <text:p text:style-name="P1">Forward</text:p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6cm" svg:height="2.5cm" svg:x="20.75cm" svg:y="4.75cm">
          <text:p text:style-name="P1">checkButton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75cm" svg:y1="6.751cm" svg:x2="8.75cm" svg:y2="8.501cm">
          <text:p/>
        </draw:line>
        <draw:custom-shape draw:style-name="gr19" draw:text-style-name="P9" draw:layer="layout" svg:width="6.5cm" svg:height="1.75cm" svg:x="5.25cm" svg:y="8.5cm">
          <text:p text:style-name="P1">playpaus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6cm" svg:height="1.75cm" svg:x="0.25cm" svg:y="8.5cm">
          <text:p text:style-name="P1">backward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5.5cm" svg:height="1.75cm" svg:x="13.5cm" svg:y="8.5cm">
          <text:p text:style-name="P1">forward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3.5cm" svg:y1="6.75cm" svg:x2="3.5cm" svg:y2="8.5cm">
          <text:p/>
        </draw:line>
        <draw:line draw:style-name="gr10" draw:text-style-name="P6" draw:layer="layout" svg:x1="16.25cm" svg:y1="8.5cm" svg:x2="16.25cm" svg:y2="7cm">
          <text:p/>
        </draw:line>
        <draw:line draw:style-name="gr10" draw:text-style-name="P6" draw:layer="layout" svg:x1="22.25cm" svg:y1="7.25cm" svg:x2="22.25cm" svg:y2="8.75cm">
          <text:p/>
        </draw:line>
        <draw:custom-shape draw:style-name="gr22" draw:text-style-name="P5" xml:id="id7" draw:id="id7" draw:layer="layout" svg:width="5.75cm" svg:height="3.5cm" svg:x="19.25cm" svg:y="8.5cm">
          <text:p text:style-name="P1">on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22cm" svg:y1="11.75cm" svg:x2="22cm" svg:y2="14.25cm">
          <text:p/>
        </draw:line>
        <draw:custom-shape draw:style-name="gr23" draw:text-style-name="P5" draw:layer="layout" svg:width="5.75cm" svg:height="3cm" svg:x="19.25cm" svg:y="14.25cm">
          <text:p text:style-name="P1">Mode = regu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45cm" svg:height="2.25cm" svg:x="23.25cm" svg:y="11.75cm">
          <text:p text:style-name="P1">Mode = continu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0" draw:layer="layout" svg:x1="25.975cm" svg:y1="11.75cm" svg:x2="25cm" svg:y2="10.25cm" draw:start-shape="id6" draw:start-glue-point="4" draw:end-shape="id7" draw:end-glue-point="7" svg:d="M25975 11750v-1500h-975" svg:viewBox="0 0 976 1501">
          <text:p/>
        </draw:connector>
        <draw:connector draw:style-name="gr12" draw:layer="layout" svg:x1="3.625cm" svg:y1="4.751cm" svg:x2="14.375cm" svg:y2="3.751cm" draw:start-shape="id8" draw:start-glue-point="0" draw:end-shape="id9" draw:end-glue-point="8" svg:d="M3625 4751v-501h4125v3h6625v-502" svg:viewBox="0 0 10751 1001">
          <text:p/>
        </draw:connector>
        <draw:connector draw:style-name="gr12" draw:layer="layout" draw:line-skew="-3.002cm" svg:x1="14.375cm" svg:y1="3.751cm" svg:x2="8.875cm" svg:y2="4.751cm" draw:start-shape="id9" draw:start-glue-point="8" draw:end-shape="id10" draw:end-glue-point="0" svg:d="M14375 3751v499h-8626 3126v501" svg:viewBox="0 0 8627 1001">
          <text:p/>
        </draw:connector>
        <draw:connector draw:style-name="gr12" draw:layer="layout" svg:x1="14.375cm" svg:y1="3.751cm" svg:x2="16.25cm" svg:y2="4.751cm" draw:start-shape="id9" draw:start-glue-point="8" draw:end-shape="id11" draw:end-glue-point="0" svg:d="M14375 3751v501h1875v499" svg:viewBox="0 0 1876 1001">
          <text:p/>
        </draw:connector>
        <draw:connector draw:style-name="gr12" draw:layer="layout" svg:x1="14.375cm" svg:y1="3.751cm" svg:x2="23.75cm" svg:y2="4.75cm" draw:start-shape="id9" draw:start-glue-point="8" draw:end-shape="id12" draw:end-glue-point="0" svg:d="M14375 3751v502h5126v-4h4249v501" svg:viewBox="0 0 9376 1000">
          <text:p/>
        </draw:connector>
      </draw:page>
      <draw:page draw:name="page5" draw:style-name="dp1" draw:master-page-name="Standard">
        <draw:custom-shape draw:style-name="gr26" draw:text-style-name="P12" draw:layer="layout" svg:width="5.25cm" svg:height="2.25cm" svg:x="7.75cm" svg:y="1.25cm">
          <text:p text:style-name="P11"><text:span text:style-name="T1">Play/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5.5cm" svg:height="3cm" svg:x="7.5cm" svg:y="4.5cm">
          <text:p text:style-name="P11"><text:span text:style-name="T1">Mode = regular 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4cm" svg:y1="6cm" svg:x2="13cm" svg:y2="6cm">
          <text:p/>
        </draw:line>
        <draw:line draw:style-name="gr10" draw:text-style-name="P6" draw:layer="layout" svg:x1="10.25cm" svg:y1="8.75cm" svg:x2="10.25cm" svg:y2="7.5cm">
          <text:p/>
        </draw:line>
        <draw:custom-shape draw:style-name="gr28" draw:text-style-name="P13" draw:layer="layout" svg:width="5.5cm" svg:height="3cm" svg:x="14cm" svg:y="4.5cm">
          <text:p text:style-name="P11"><text:span text:style-name="T1">State = c_playing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3.5cm" svg:x2="10.25cm" svg:y2="4.5cm">
          <text:p/>
        </draw:line>
        <draw:line draw:style-name="gr10" draw:text-style-name="P6" draw:layer="layout" svg:x1="19.5cm" svg:y1="6cm" svg:x2="20.5cm" svg:y2="6cm">
          <text:p/>
        </draw:line>
        <draw:line draw:style-name="gr10" draw:text-style-name="P6" draw:layer="layout" svg:x1="16.75cm" svg:y1="8.75cm" svg:x2="16.75cm" svg:y2="7.5cm">
          <text:p/>
        </draw:line>
        <draw:custom-shape draw:style-name="gr29" draw:text-style-name="P13" draw:layer="layout" svg:width="6cm" svg:height="3.25cm" svg:x="7.25cm" svg:y="8.75cm">
          <text:p text:style-name="P11"><text:span text:style-name="T1">Period <text:s text:c="2"/>!= 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12cm" svg:x2="10.25cm" svg:y2="12.75cm">
          <text:p/>
        </draw:line>
        <draw:custom-shape draw:style-name="gr30" draw:text-style-name="P5" xml:id="id13" draw:id="id13" draw:layer="layout" svg:width="6.25cm" svg:height="2cm" svg:x="7.25cm" svg:y="12.75cm">
          <text:p text:style-name="P1">step_play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5" xml:id="id16" draw:id="id16" draw:layer="layout" svg:width="6.25cm" svg:height="2cm" svg:x="19.75cm" svg:y="5cm">
          <text:p text:style-name="P1">cont_play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5" xml:id="id15" draw:id="id15" draw:layer="layout" svg:width="5.75cm" svg:height="2cm" svg:x="13.5cm" svg:y="8.75cm">
          <text:p text:style-name="P1">dopause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5" xml:id="id14" draw:id="id14" draw:layer="layout" svg:width="7cm" svg:height="2.75cm" svg:x="12.5cm" svg:y="1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svg:x1="9.594cm" svg:y1="14.75cm" svg:x2="12.5cm" svg:y2="17.375cm" draw:start-shape="id13" draw:start-glue-point="7" draw:end-shape="id14" draw:end-glue-point="6" svg:d="M9594 14750v2625h2906" svg:viewBox="0 0 2907 2626">
          <text:p/>
        </draw:connector>
        <draw:connector draw:style-name="gr12" draw:layer="layout" svg:x1="15.656cm" svg:y1="10.75cm" svg:x2="16cm" svg:y2="16cm" draw:start-shape="id15" draw:start-glue-point="7" draw:end-shape="id14" draw:end-glue-point="4" svg:d="M15656 10750v2626h344v2624" svg:viewBox="0 0 345 5251">
          <text:p/>
        </draw:connector>
        <draw:connector draw:style-name="gr12" draw:layer="layout" svg:x1="22.094cm" svg:y1="7cm" svg:x2="19.5cm" svg:y2="17.375cm" draw:start-shape="id16" draw:start-glue-point="7" draw:end-shape="id14" draw:end-glue-point="10" svg:d="M22094 7000v10375h-2594" svg:viewBox="0 0 2595 10376">
          <text:p/>
        </draw:connector>
      </draw:page>
      <draw:page draw:name="page6" draw:style-name="dp1" draw:master-page-name="Standard">
        <draw:custom-shape draw:style-name="gr26" draw:text-style-name="P12" draw:layer="layout" svg:width="5.25cm" svg:height="2.25cm" svg:x="7.75cm" svg:y="1.251cm">
          <text:p text:style-name="P11"><text:span text:style-name="T1">Start 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17" draw:id="id17" draw:layer="layout" svg:width="7cm" svg:height="3cm" svg:x="6.75cm" svg:y="4.5cm">
          <text:p text:style-name="P11"><text:span text:style-name="T1">Observer = ‘ ‘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0.25cm" svg:y1="8.751cm" svg:x2="10.25cm" svg:y2="7.501cm">
          <text:p/>
        </draw:line>
        <draw:line draw:style-name="gr10" draw:text-style-name="P6" draw:layer="layout" svg:x1="10.25cm" svg:y1="3.501cm" svg:x2="10.25cm" svg:y2="4.501cm">
          <text:p/>
        </draw:line>
        <draw:line draw:style-name="gr10" draw:text-style-name="P6" draw:layer="layout" svg:x1="9.5cm" svg:y1="10.75cm" svg:x2="9.5cm" svg:y2="12.5cm">
          <text:p/>
        </draw:line>
        <draw:custom-shape draw:style-name="gr34" draw:text-style-name="P5" xml:id="id18" draw:id="id18" draw:layer="layout" svg:width="11.75cm" svg:height="2cm" svg:x="3.5cm" svg:y="12.5cm">
          <text:p text:style-name="P1">Container.append ..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5" draw:layer="layout" svg:width="6.25cm" svg:height="2cm" svg:x="6.75cm" svg:y="8.75cm">
          <text:p text:style-name="P1">askstr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layer="layout" draw:line-skew="0cm 1.999cm" svg:x1="13.75cm" svg:y1="6cm" svg:x2="9.375cm" svg:y2="12.5cm" draw:start-shape="id17" draw:start-glue-point="7" draw:end-shape="id18" draw:end-glue-point="5" svg:d="M13750 6000h502v6000h-4877v500" svg:viewBox="0 0 4878 6501">
          <text:p/>
        </draw:connector>
        <draw:custom-shape draw:style-name="gr35" draw:text-style-name="P5" draw:layer="layout" svg:width="5cm" svg:height="3.25cm" svg:x="6.75cm" svg:y="15.75cm">
          <text:p text:style-name="P1">Data load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9.25cm" svg:y1="14.5cm" svg:x2="9.25cm" svg:y2="15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376cm" fo:min-width="1.5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9:11.946006974</meta:creation-date>
    <dc:date>2023-06-29T20:57:45.312503830</dc:date>
    <meta:editing-duration>PT4H5M50S</meta:editing-duration>
    <meta:editing-cycles>3</meta:editing-cycles>
    <meta:generator>LibreOffice/7.4.5.1$Linux_X86_64 LibreOffice_project/40$Build-1</meta:generator>
    <meta:document-statistic meta:object-count="76"/>
  </office:meta>
</office:document-meta>
</file>